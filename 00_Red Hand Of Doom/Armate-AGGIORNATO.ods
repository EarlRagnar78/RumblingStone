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svg="urn:oasis:names:tc:opendocument:xmlns:svg-compatible:1.0" office:version="1.2">
  <office:font-face-decls>
    <style:font-face style:name="Liberation Sans" svg:font-family="Liberation Sans"/>
  </office:font-face-decls>
  <office:automatic-styles>
    <style:style style:name="ta1" style:family="table">
      <style:table-properties table:display="true"/>
    </style:style>
    <style:style style:name="ce1" style:family="table-cell">
      <style:text-properties fo:font-weight="bold"/>
    </style:style>
  </office:automatic-styles>
  <office:body>
    <office:spreadsheet>
      <table:table table:name="Riepilogo" table:style-name="ta1">
        <table:table-row>
          <table:table-cell table:style-name="head" office:value-type="string">
            <text:p>RIEPILOGO ORDA — Mano Rossa (Day 42 = Rethmar)</text:p>
          </table:table-cell>
          <table:table-cell/>
          <table:table-cell/>
        </table:table-row>
        <table:table-row>
          <table:table-cell table:style-name="bold" office:value-type="string">
            <text:p>Campo</text:p>
          </table:table-cell>
          <table:table-cell table:style-name="bold" office:value-type="string">
            <text:p>Valore</text:p>
          </table:table-cell>
          <table:table-cell table:style-name="bold" office:value-type="string">
            <text:p>Note</text:p>
          </table:table-cell>
        </table:table-row>
        <table:table-row>
          <table:table-cell office:value-type="string">
            <text:p>Baseline iniziale (Day 0)</text:p>
          </table:table-cell>
          <table:table-cell office:value-type="float" office:value="9940.0">
            <text:p>9.940</text:p>
          </table:table-cell>
          <table:table-cell office:value-type="string">
            <text:p>v2 canon</text:p>
          </table:table-cell>
        </table:table-row>
        <table:table-row>
          <table:table-cell office:value-type="string">
            <text:p>Main body (post-distaccamenti)</text:p>
          </table:table-cell>
          <table:table-cell office:value-type="float" office:value="8590.0">
            <text:p>8.590</text:p>
          </table:table-cell>
          <table:table-cell office:value-type="string">
            <text:p>vanguard −900 + altri −450</text:p>
          </table:table-cell>
        </table:table-row>
        <table:table-row>
          <table:table-cell office:value-type="string">
            <text:p>Main body Day 19 (SYNC POINT)</text:p>
          </table:table-cell>
          <table:table-cell office:value-type="float" office:value="8490.0">
            <text:p>8.490</text:p>
          </table:table-cell>
          <table:table-cell office:value-type="string">
            <text:p>post-Hammerfist catastrofe</text:p>
          </table:table-cell>
        </table:table-row>
        <table:table-row>
          <table:table-cell office:value-type="string">
            <text:p>Aberrazioni Sonjak (creati Day 35-37)</text:p>
          </table:table-cell>
          <table:table-cell office:value-type="float" office:value="83.0">
            <text:p>83</text:p>
          </table:table-cell>
          <table:table-cell office:value-type="string">
            <text:p>Sporeborn 30 + Servitori 45 + Guardiani 8</text:p>
          </table:table-cell>
        </table:table-row>
        <table:table-row>
          <table:table-cell office:value-type="string">
            <text:p>Baseline arrivo Rethmar Day 42</text:p>
          </table:table-cell>
          <table:table-cell office:value-type="float" office:value="8390.0">
            <text:p>8.390</text:p>
          </table:table-cell>
          <table:table-cell office:value-type="string">
            <text:p>senza additivi condizionali</text:p>
          </table:table-cell>
        </table:table-row>
        <table:table-row>
          <table:table-cell/>
        </table:table-row>
        <table:table-row>
          <table:table-cell table:style-name="head" office:value-type="string">
            <text:p>ADDITIVI CONDIZIONALI</text:p>
          </table:table-cell>
          <table:table-cell/>
          <table:table-cell/>
        </table:table-row>
        <table:table-row>
          <table:table-cell office:value-type="string">
            <text:p>Ghostlord ostile (default AP)</text:p>
          </table:table-cell>
          <table:table-cell office:value-type="float" office:value="2400.0">
            <text:p>+2.400</text:p>
          </table:table-cell>
          <table:table-cell office:value-type="string">
            <text:p>→ ~10.790 totale</text:p>
          </table:table-cell>
        </table:table-row>
        <table:table-row>
          <table:table-cell office:value-type="string">
            <text:p>Ghostlord neutralizzato (PG)</text:p>
          </table:table-cell>
          <table:table-cell office:value-type="float" office:value="400.0">
            <text:p>+400</text:p>
          </table:table-cell>
          <table:table-cell office:value-type="string">
            <text:p>solo distaccamento pre-inviato</text:p>
          </table:table-cell>
        </table:table-row>
        <table:table-row>
          <table:table-cell office:value-type="string">
            <text:p>Ghostlord redento (branch raro)</text:p>
          </table:table-cell>
          <table:table-cell office:value-type="float" office:value="0.0">
            <text:p>0</text:p>
          </table:table-cell>
          <table:table-cell office:value-type="string">
            <text:p>+600 a DIFENSORI</text:p>
          </table:table-cell>
        </table:table-row>
        <table:table-row>
          <table:table-cell office:value-type="string">
            <text:p>Xal'thor allea Mano Rossa</text:p>
          </table:table-cell>
          <table:table-cell office:value-type="float" office:value="400.0">
            <text:p>+400</text:p>
          </table:table-cell>
          <table:table-cell office:value-type="string">
            <text:p>Illithid thralls</text:p>
          </table:table-cell>
        </table:table-row>
        <table:table-row>
          <table:table-cell/>
        </table:table-row>
        <table:table-row>
          <table:table-cell table:style-name="head" office:value-type="string">
            <text:p>DIFENSORI RETHMAR</text:p>
          </table:table-cell>
          <table:table-cell/>
          <table:table-cell/>
        </table:table-row>
        <table:table-row>
          <table:table-cell office:value-type="string">
            <text:p>Garantiti</text:p>
          </table:table-cell>
          <table:table-cell office:value-type="float" office:value="2200.0">
            <text:p>2.200</text:p>
          </table:table-cell>
          <table:table-cell office:value-type="string">
            <text:p>guarnigione + rifugiati armati</text:p>
          </table:table-cell>
        </table:table-row>
        <table:table-row>
          <table:table-cell office:value-type="string">
            <text:p>Massimo (tutte le quest PG)</text:p>
          </table:table-cell>
          <table:table-cell office:value-type="float" office:value="4700.0">
            <text:p>4.700</text:p>
          </table:table-cell>
          <table:table-cell office:value-type="string">
            <text:p>incluso Ghostlord redento</text:p>
          </table:table-cell>
        </table:table-row>
        <table:table-row>
          <table:table-cell/>
        </table:table-row>
        <table:table-row>
          <table:table-cell table:style-name="head" office:value-type="string">
            <text:p>RATIO A RETHMAR</text:p>
          </table:table-cell>
          <table:table-cell/>
          <table:table-cell/>
        </table:table-row>
        <table:table-row>
          <table:table-cell office:value-type="string">
            <text:p>Scenario peggiore (Ghostlord ostile, 0 quest)</text:p>
          </table:table-cell>
          <table:table-cell office:value-type="string">
            <text:p>~10.790 / 2.200 = 4.9:1</text:p>
          </table:table-cell>
          <table:table-cell office:value-type="string">
            <text:p>Rethmar CADE</text:p>
          </table:table-cell>
        </table:table-row>
        <table:table-row>
          <table:table-cell office:value-type="string">
            <text:p>Baseline (0 quest PG)</text:p>
          </table:table-cell>
          <table:table-cell office:value-type="string">
            <text:p>~8.390 / 2.200 = 3.8:1</text:p>
          </table:table-cell>
          <table:table-cell office:value-type="string">
            <text:p>Sconfitta quasi certa</text:p>
          </table:table-cell>
        </table:table-row>
        <table:table-row>
          <table:table-cell office:value-type="string">
            <text:p>Medio (2-3 quest + sabotaggi)</text:p>
          </table:table-cell>
          <table:table-cell office:value-type="string">
            <text:p>~7.000 / 3.100 = 2.3:1</text:p>
          </table:table-cell>
          <table:table-cell office:value-type="string">
            <text:p>Difficile ma vincibile</text:p>
          </table:table-cell>
        </table:table-row>
        <table:table-row>
          <table:table-cell office:value-type="string">
            <text:p>Ottimale (tutte quest)</text:p>
          </table:table-cell>
          <table:table-cell office:value-type="string">
            <text:p>~6.000 / 4.100 = 1.5:1</text:p>
          </table:table-cell>
          <table:table-cell office:value-type="string">
            <text:p>Vittoria con perdite</text:p>
          </table:table-cell>
        </table:table-row>
        <table:table-row>
          <table:table-cell office:value-type="string">
            <text:p>Leggendario (Ghostlord redento + tutto)</text:p>
          </table:table-cell>
          <table:table-cell office:value-type="string">
            <text:p>~5.800 / 4.700 = 1.2:1</text:p>
          </table:table-cell>
          <table:table-cell office:value-type="string">
            <text:p>Vittoria decisiva</text:p>
          </table:table-cell>
        </table:table-row>
      </table:table>
      <table:table table:name="Composizione" table:style-name="ta1">
        <table:table-row>
          <table:table-cell table:style-name="head" office:value-type="string">
            <text:p>COMPOSIZIONE DETTAGLIATA ORDA (Baseline v2 ~9.940)</text:p>
          </table:table-cell>
          <table:table-cell/>
          <table:table-cell/>
          <table:table-cell/>
        </table:table-row>
        <table:table-row>
          <table:table-cell table:style-name="bold" office:value-type="string">
            <text:p>Categoria</text:p>
          </table:table-cell>
          <table:table-cell table:style-name="bold" office:value-type="string">
            <text:p>Unità</text:p>
          </table:table-cell>
          <table:table-cell table:style-name="bold" office:value-type="string">
            <text:p>Numero</text:p>
          </table:table-cell>
          <table:table-cell table:style-name="bold" office:value-type="string">
            <text:p>Note</text:p>
          </table:table-cell>
        </table:table-row>
        <table:table-row>
          <table:table-cell table:style-name="sub" office:value-type="string">
            <text:p>2.1 — NUCLEO RED HAND</text:p>
          </table:table-cell>
          <table:table-cell/>
          <table:table-cell table:style-name="sub" office:value-type="string">
            <text:p>7.028</text:p>
          </table:table-cell>
          <table:table-cell/>
        </table:table-row>
        <table:table-row>
          <table:table-cell office:value-type="string">
            <text:p>Hobgoblin Fanteria std (Warrior 1/Fighter 1)</text:p>
          </table:table-cell>
          <table:table-cell office:value-type="string">
            <text:p>MM Hobgoblin + class</text:p>
          </table:table-cell>
          <table:table-cell office:value-type="float" office:value="3600.0">
            <text:p>3.600</text:p>
          </table:table-cell>
          <table:table-cell/>
        </table:table-row>
        <table:table-row>
          <table:table-cell office:value-type="string">
            <text:p>Hobgoblin Veterani (Fighter 3)</text:p>
          </table:table-cell>
          <table:table-cell office:value-type="string">
            <text:p>MM+PHB</text:p>
          </table:table-cell>
          <table:table-cell office:value-type="float" office:value="900.0">
            <text:p>900</text:p>
          </table:table-cell>
          <table:table-cell/>
        </table:table-row>
        <table:table-row>
          <table:table-cell office:value-type="string">
            <text:p>Hobgoblin Sergenti (Fighter 5)</text:p>
          </table:table-cell>
          <table:table-cell office:value-type="string">
            <text:p>MM+PHB</text:p>
          </table:table-cell>
          <table:table-cell office:value-type="float" office:value="240.0">
            <text:p>240</text:p>
          </table:table-cell>
          <table:table-cell/>
        </table:table-row>
        <table:table-row>
          <table:table-cell office:value-type="string">
            <text:p>Hobgoblin Capitani (Warrior 3 élite)</text:p>
          </table:table-cell>
          <table:table-cell office:value-type="string">
            <text:p>RHoD upscaled</text:p>
          </table:table-cell>
          <table:table-cell office:value-type="float" office:value="60.0">
            <text:p>60</text:p>
          </table:table-cell>
          <table:table-cell/>
        </table:table-row>
        <table:table-row>
          <table:table-cell office:value-type="string">
            <text:p>Goblin Fanteria (Warrior 1)</text:p>
          </table:table-cell>
          <table:table-cell office:value-type="string">
            <text:p>MM</text:p>
          </table:table-cell>
          <table:table-cell office:value-type="float" office:value="800.0">
            <text:p>800</text:p>
          </table:table-cell>
          <table:table-cell/>
        </table:table-row>
        <table:table-row>
          <table:table-cell office:value-type="string">
            <text:p>Orchi (Warrior 2)</text:p>
          </table:table-cell>
          <table:table-cell office:value-type="string">
            <text:p>MM</text:p>
          </table:table-cell>
          <table:table-cell office:value-type="float" office:value="700.0">
            <text:p>700</text:p>
          </table:table-cell>
          <table:table-cell/>
        </table:table-row>
        <table:table-row>
          <table:table-cell office:value-type="string">
            <text:p>Worg Riders</text:p>
          </table:table-cell>
          <table:table-cell office:value-type="string">
            <text:p>MM</text:p>
          </table:table-cell>
          <table:table-cell office:value-type="float" office:value="300.0">
            <text:p>300</text:p>
          </table:table-cell>
          <table:table-cell/>
        </table:table-row>
        <table:table-row>
          <table:table-cell office:value-type="string">
            <text:p>Giganti delle Colline</text:p>
          </table:table-cell>
          <table:table-cell office:value-type="string">
            <text:p>MM</text:p>
          </table:table-cell>
          <table:table-cell office:value-type="float" office:value="80.0">
            <text:p>80</text:p>
          </table:table-cell>
          <table:table-cell office:value-type="string">
            <text:p>3 druidi/clan</text:p>
          </table:table-cell>
        </table:table-row>
        <table:table-row>
          <table:table-cell office:value-type="string">
            <text:p>Ogre</text:p>
          </table:table-cell>
          <table:table-cell office:value-type="string">
            <text:p>MM</text:p>
          </table:table-cell>
          <table:table-cell office:value-type="float" office:value="70.0">
            <text:p>70</text:p>
          </table:table-cell>
          <table:table-cell office:value-type="string">
            <text:p>assortiti</text:p>
          </table:table-cell>
        </table:table-row>
        <table:table-row>
          <table:table-cell office:value-type="string">
            <text:p>Ettin</text:p>
          </table:table-cell>
          <table:table-cell office:value-type="string">
            <text:p>MM</text:p>
          </table:table-cell>
          <table:table-cell office:value-type="float" office:value="30.0">
            <text:p>30</text:p>
          </table:table-cell>
          <table:table-cell office:value-type="string">
            <text:p>coppie comando</text:p>
          </table:table-cell>
        </table:table-row>
        <table:table-row>
          <table:table-cell office:value-type="string">
            <text:p>Manticore</text:p>
          </table:table-cell>
          <table:table-cell office:value-type="string">
            <text:p>MM</text:p>
          </table:table-cell>
          <table:table-cell office:value-type="float" office:value="40.0">
            <text:p>40</text:p>
          </table:table-cell>
          <table:table-cell/>
        </table:table-row>
        <table:table-row>
          <table:table-cell office:value-type="string">
            <text:p>Wyvern (addestrate, non-Ghostlord)</text:p>
          </table:table-cell>
          <table:table-cell office:value-type="string">
            <text:p>MM</text:p>
          </table:table-cell>
          <table:table-cell office:value-type="float" office:value="50.0">
            <text:p>50</text:p>
          </table:table-cell>
          <table:table-cell/>
        </table:table-row>
        <table:table-row>
          <table:table-cell office:value-type="string">
            <text:p>Hell Hound</text:p>
          </table:table-cell>
          <table:table-cell office:value-type="string">
            <text:p>MM</text:p>
          </table:table-cell>
          <table:table-cell office:value-type="float" office:value="30.0">
            <text:p>30</text:p>
          </table:table-cell>
          <table:table-cell office:value-type="string">
            <text:p>demoni minori</text:p>
          </table:table-cell>
        </table:table-row>
        <table:table-row>
          <table:table-cell office:value-type="string">
            <text:p>Chimera</text:p>
          </table:table-cell>
          <table:table-cell office:value-type="string">
            <text:p>MM</text:p>
          </table:table-cell>
          <table:table-cell office:value-type="float" office:value="20.0">
            <text:p>20</text:p>
          </table:table-cell>
          <table:table-cell/>
        </table:table-row>
        <table:table-row>
          <table:table-cell office:value-type="string">
            <text:p>War Adepts (Adept 5)</text:p>
          </table:table-cell>
          <table:table-cell office:value-type="string">
            <text:p>DMG</text:p>
          </table:table-cell>
          <table:table-cell office:value-type="float" office:value="25.0">
            <text:p>25</text:p>
          </table:table-cell>
          <table:table-cell office:value-type="string">
            <text:p>caster d'assalto</text:p>
          </table:table-cell>
        </table:table-row>
        <table:table-row>
          <table:table-cell office:value-type="string">
            <text:p>Blue (psionic goblinoid casters)</text:p>
          </table:table-cell>
          <table:table-cell office:value-type="string">
            <text:p>MM II</text:p>
          </table:table-cell>
          <table:table-cell office:value-type="float" office:value="10.0">
            <text:p>10</text:p>
          </table:table-cell>
          <table:table-cell/>
        </table:table-row>
        <table:table-row>
          <table:table-cell office:value-type="string">
            <text:p>Warpriests di Tiamat (Cleric 7)</text:p>
          </table:table-cell>
          <table:table-cell office:value-type="string">
            <text:p>PHB</text:p>
          </table:table-cell>
          <table:table-cell office:value-type="float" office:value="20.0">
            <text:p>20</text:p>
          </table:table-cell>
          <table:table-cell/>
        </table:table-row>
        <table:table-row>
          <table:table-cell/>
        </table:table-row>
        <table:table-row>
          <table:table-cell table:style-name="sub" office:value-type="string">
            <text:p>2.2 — DRAGONI (5, AP-canon upscaled)</text:p>
          </table:table-cell>
          <table:table-cell/>
          <table:table-cell/>
          <table:table-cell/>
        </table:table-row>
        <table:table-row>
          <table:table-cell table:style-name="bold" office:value-type="string">
            <text:p>Drago</text:p>
          </table:table-cell>
          <table:table-cell table:style-name="bold" office:value-type="string">
            <text:p>GS</text:p>
          </table:table-cell>
          <table:table-cell table:style-name="bold" office:value-type="string">
            <text:p>Stato</text:p>
          </table:table-cell>
          <table:table-cell table:style-name="bold" office:value-type="string">
            <text:p>Arco</text:p>
          </table:table-cell>
        </table:table-row>
        <table:table-row>
          <table:table-cell office:value-type="string">
            <text:p>Abithriax (Red adult)</text:p>
          </table:table-cell>
          <table:table-cell office:value-type="string">
            <text:p>14</text:p>
          </table:table-cell>
          <table:table-cell office:value-type="string">
            <text:p>Vivo — Skull Gorge → Rethmar Fase 1</text:p>
          </table:table-cell>
          <table:table-cell office:value-type="string">
            <text:p>AP canon</text:p>
          </table:table-cell>
        </table:table-row>
        <table:table-row>
          <table:table-cell office:value-type="string">
            <text:p>Regiarix (Black young adult)</text:p>
          </table:table-cell>
          <table:table-cell office:value-type="string">
            <text:p>12</text:p>
          </table:table-cell>
          <table:table-cell office:value-type="string">
            <text:p>A RISCHIO — P2 Rhest</text:p>
          </table:table-cell>
          <table:table-cell office:value-type="string">
            <text:p>AP canon</text:p>
          </table:table-cell>
        </table:table-row>
        <table:table-row>
          <table:table-cell office:value-type="string">
            <text:p>Ozyrrandion (Blue adult)</text:p>
          </table:table-cell>
          <table:table-cell office:value-type="string">
            <text:p>14</text:p>
          </table:table-cell>
          <table:table-cell office:value-type="string">
            <text:p>A RISCHIO — Torre Zalkatar</text:p>
          </table:table-cell>
          <table:table-cell office:value-type="string">
            <text:p>AP canon</text:p>
          </table:table-cell>
        </table:table-row>
        <table:table-row>
          <table:table-cell office:value-type="string">
            <text:p>Tyrgarun (Black adult)</text:p>
          </table:table-cell>
          <table:table-cell office:value-type="string">
            <text:p>14</text:p>
          </table:table-cell>
          <table:table-cell office:value-type="string">
            <text:p>Vivo — riserva aerea Rethmar</text:p>
          </table:table-cell>
          <table:table-cell office:value-type="string">
            <text:p>AP upscaled</text:p>
          </table:table-cell>
        </table:table-row>
        <table:table-row>
          <table:table-cell office:value-type="string">
            <text:p>Fauci di Palude (Black adult)</text:p>
          </table:table-cell>
          <table:table-cell office:value-type="string">
            <text:p>14</text:p>
          </table:table-cell>
          <table:table-cell office:value-type="string">
            <text:p>ANNIENTATO a Hammerfist Day 19</text:p>
          </table:table-cell>
          <table:table-cell office:value-type="string">
            <text:p>Campaign canon</text:p>
          </table:table-cell>
        </table:table-row>
        <table:table-row>
          <table:table-cell/>
        </table:table-row>
        <table:table-row>
          <table:table-cell table:style-name="sub" office:value-type="string">
            <text:p>2.3 — RAZORFIEND (8 totali, spawn draconici Tiamat)</text:p>
          </table:table-cell>
          <table:table-cell/>
          <table:table-cell/>
          <table:table-cell/>
        </table:table-row>
        <table:table-row>
          <table:table-cell office:value-type="string">
            <text:p>Black Razorfiend ×2</text:p>
          </table:table-cell>
          <table:table-cell office:value-type="string">
            <text:p>12</text:p>
          </table:table-cell>
          <table:table-cell office:value-type="string">
            <text:p>Saarvith/Rhest — rimossi se PG vincono</text:p>
          </table:table-cell>
          <table:table-cell/>
        </table:table-row>
        <table:table-row>
          <table:table-cell office:value-type="string">
            <text:p>Red Razorfiend ×2</text:p>
          </table:table-cell>
          <table:table-cell office:value-type="string">
            <text:p>12</text:p>
          </table:table-cell>
          <table:table-cell office:value-type="string">
            <text:p>Karruk → Rethmar Fase 1</text:p>
          </table:table-cell>
          <table:table-cell/>
        </table:table-row>
        <table:table-row>
          <table:table-cell office:value-type="string">
            <text:p>Blue Razorfiend ×1</text:p>
          </table:table-cell>
          <table:table-cell office:value-type="string">
            <text:p>12</text:p>
          </table:table-cell>
          <table:table-cell office:value-type="string">
            <text:p>Torre (rimosso se Zalkatar cade)</text:p>
          </table:table-cell>
          <table:table-cell/>
        </table:table-row>
        <table:table-row>
          <table:table-cell office:value-type="string">
            <text:p>White Razorfiend ×1</text:p>
          </table:table-cell>
          <table:table-cell office:value-type="string">
            <text:p>12</text:p>
          </table:table-cell>
          <table:table-cell office:value-type="string">
            <text:p>Azarr Kul guard — Rethmar Fase 3</text:p>
          </table:table-cell>
          <table:table-cell/>
        </table:table-row>
        <table:table-row>
          <table:table-cell office:value-type="string">
            <text:p>Green Razorfiend ×2</text:p>
          </table:table-cell>
          <table:table-cell office:value-type="string">
            <text:p>12</text:p>
          </table:table-cell>
          <table:table-cell office:value-type="string">
            <text:p>Azarr Kul avatar support — Fase 3</text:p>
          </table:table-cell>
          <table:table-cell/>
        </table:table-row>
        <table:table-row>
          <table:table-cell/>
        </table:table-row>
        <table:table-row>
          <table:table-cell table:style-name="sub" office:value-type="string">
            <text:p>2.4 — ALLEATI/MERCENARI (2.910)</text:p>
          </table:table-cell>
          <table:table-cell/>
          <table:table-cell/>
          <table:table-cell/>
        </table:table-row>
        <table:table-row>
          <table:table-cell office:value-type="string">
            <text:p>Compagnia Drow di Sonjak</text:p>
          </table:table-cell>
          <table:table-cell office:value-type="string">
            <text:p>Vari</text:p>
          </table:table-cell>
          <table:table-cell office:value-type="float" office:value="305.0">
            <text:p>305</text:p>
          </table:table-cell>
          <table:table-cell office:value-type="string">
            <text:p>Fase 0 Notte dei Drow + supporto</text:p>
          </table:table-cell>
        </table:table-row>
        <table:table-row>
          <table:table-cell office:value-type="string">
            <text:p>Githyanki di Vaereth</text:p>
          </table:table-cell>
          <table:table-cell office:value-type="string">
            <text:p>Fighter 8+</text:p>
          </table:table-cell>
          <table:table-cell office:value-type="float" office:value="375.0">
            <text:p>375</text:p>
          </table:table-cell>
          <table:table-cell office:value-type="string">
            <text:p>Dragonrider corps</text:p>
          </table:table-cell>
        </table:table-row>
        <table:table-row>
          <table:table-cell office:value-type="string">
            <text:p>Gnoll mercenari (3 tribù)</text:p>
          </table:table-cell>
          <table:table-cell office:value-type="string">
            <text:p>Warrior 3-4</text:p>
          </table:table-cell>
          <table:table-cell office:value-type="float" office:value="1100.0">
            <text:p>1.100</text:p>
          </table:table-cell>
          <table:table-cell office:value-type="string">
            <text:p>Flinderoso 500 + Abbattitori 350 + Artigli Neri 250</text:p>
          </table:table-cell>
        </table:table-row>
        <table:table-row>
          <table:table-cell office:value-type="string">
            <text:p>Loxo + Centauri (Shaar, schiavi)</text:p>
          </table:table-cell>
          <table:table-cell office:value-type="string">
            <text:p>GS 8-10</text:p>
          </table:table-cell>
          <table:table-cell office:value-type="float" office:value="480.0">
            <text:p>480</text:p>
          </table:table-cell>
          <table:table-cell office:value-type="string">
            <text:p>Revolt trigger se PG diplomazia</text:p>
          </table:table-cell>
        </table:table-row>
        <table:table-row>
          <table:table-cell office:value-type="string">
            <text:p>Compagnia del Teschio Nero (umani Thay/Mulhorand)</text:p>
          </table:table-cell>
          <table:table-cell office:value-type="string">
            <text:p>Fighter 5-7</text:p>
          </table:table-cell>
          <table:table-cell office:value-type="float" office:value="650.0">
            <text:p>650</text:p>
          </table:table-cell>
          <table:table-cell office:value-type="string">
            <text:p>Heavy infantry + 6 Wizard 7 + CR 10 cmdr</text:p>
          </table:table-cell>
        </table:table-row>
        <table:table-row>
          <table:table-cell/>
        </table:table-row>
        <table:table-row>
          <table:table-cell table:style-name="sub" office:value-type="string">
            <text:p>2.4a — ABERRAZIONI SONJAK (create Day 35-37)</text:p>
          </table:table-cell>
          <table:table-cell/>
          <table:table-cell table:style-name="sub" office:value-type="string">
            <text:p>83</text:p>
          </table:table-cell>
          <table:table-cell table:style-name="sub" office:value-type="string">
            <text:p>Distrutte se PG sabotano Campi Drow</text:p>
          </table:table-cell>
        </table:table-row>
        <table:table-row>
          <table:table-cell office:value-type="string">
            <text:p>Sporeborn (Drow ibridati spore fungine)</text:p>
          </table:table-cell>
          <table:table-cell office:value-type="string">
            <text:p>GS 6</text:p>
          </table:table-cell>
          <table:table-cell office:value-type="float" office:value="30.0">
            <text:p>30</text:p>
          </table:table-cell>
          <table:table-cell office:value-type="string">
            <text:p>Berserker mode; rischio fuoco amico</text:p>
          </table:table-cell>
        </table:table-row>
        <table:table-row>
          <table:table-cell office:value-type="string">
            <text:p>Servitori della Spora (umanoidi infetti)</text:p>
          </table:table-cell>
          <table:table-cell office:value-type="string">
            <text:p>GS 3</text:p>
          </table:table-cell>
          <table:table-cell office:value-type="float" office:value="45.0">
            <text:p>45</text:p>
          </table:table-cell>
          <table:table-cell office:value-type="string">
            <text:p>Carica suicida; veleno CD 16; mindless</text:p>
          </table:table-cell>
        </table:table-row>
        <table:table-row>
          <table:table-cell office:value-type="string">
            <text:p>Guardiani Neri (innesti aberranti élite)</text:p>
          </table:table-cell>
          <table:table-cell office:value-type="string">
            <text:p>GS 9</text:p>
          </table:table-cell>
          <table:table-cell office:value-type="float" office:value="8.0">
            <text:p>8</text:p>
          </table:table-cell>
          <table:table-cell office:value-type="string">
            <text:p>Occhio-beholder + tentacolo illithid</text:p>
          </table:table-cell>
        </table:table-row>
      </table:table>
      <table:table table:name="March Clock Day1-42" table:style-name="ta1">
        <table:table-row>
          <table:table-cell table:style-name="head" office:value-type="string">
            <text:p>MARCH CLOCK — Day 1 → 42 (v2.1, sync Day 19 = Hammerfist end)</text:p>
          </table:table-cell>
          <table:table-cell/>
          <table:table-cell/>
          <table:table-cell/>
          <table:table-cell/>
        </table:table-row>
        <table:table-row>
          <table:table-cell table:style-name="bold" office:value-type="string">
            <text:p>Day</text:p>
          </table:table-cell>
          <table:table-cell table:style-name="bold" office:value-type="string">
            <text:p>Waypoint AP originale</text:p>
          </table:table-cell>
          <table:table-cell table:style-name="bold" office:value-type="string">
            <text:p>Equivalente campagna</text:p>
          </table:table-cell>
          <table:table-cell table:style-name="bold" office:value-type="string">
            <text:p>Evento</text:p>
          </table:table-cell>
          <table:table-cell table:style-name="bold" office:value-type="string">
            <text:p>Statu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Horde lascia Fane of Tiamat</text:p>
          </table:table-cell>
          <table:table-cell office:value-type="string">
            <text:p>Shaar</text:p>
          </table:table-cell>
          <table:table-cell office:value-type="string">
            <text:p>Marcia inizia</text:p>
          </table:table-cell>
          <table:table-cell table:style-name="ok" office:value-type="string">
            <text:p>✅ PAST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Vraath Keep occupata</text:p>
          </table:table-cell>
          <table:table-cell office:value-type="string">
            <text:p>Channath Vale equivalent</text:p>
          </table:table-cell>
          <table:table-cell office:value-type="string">
            <text:p>Base operativa Wyrmlord Koth</text:p>
          </table:table-cell>
          <table:table-cell table:style-name="ok" office:value-type="string">
            <text:p>✅ PAST</text:p>
          </table:table-cell>
        </table:table-row>
        <table:table-row>
          <table:table-cell office:value-type="string">
            <text:p>8-9</text:p>
          </table:table-cell>
          <table:table-cell office:value-type="string">
            <text:p>Skull Gorge bridge</text:p>
          </table:table-cell>
          <table:table-cell office:value-type="string">
            <text:p>Skull Gorge bridge</text:p>
          </table:table-cell>
          <table:table-cell office:value-type="string">
            <text:p>Attraversato INTATTO (PG non sabotano)</text:p>
          </table:table-cell>
          <table:table-cell table:style-name="ok" office:value-type="string">
            <text:p>✅ PAST</text:p>
          </table:table-cell>
        </table:table-row>
        <table:table-row>
          <table:table-cell office:value-type="string">
            <text:p>12-13</text:p>
          </table:table-cell>
          <table:table-cell office:value-type="string">
            <text:p>Drellin's Ferry assalto</text:p>
          </table:table-cell>
          <table:table-cell office:value-type="string">
            <text:p>Drellin eq.</text:p>
          </table:table-cell>
          <table:table-cell office:value-type="string">
            <text:p>Villaggio bruciato</text:p>
          </table:table-cell>
          <table:table-cell table:style-name="ok" office:value-type="string">
            <text:p>✅ PAST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rrelton cade</text:p>
          </table:table-cell>
          <table:table-cell office:value-type="string">
            <text:p>Terrelton eq. (Channath Vale)</text:p>
          </table:table-cell>
          <table:table-cell office:value-type="string">
            <text:p>🎯 SYNC POINT: Hammerfist si conclude simultaneamente</text:p>
          </table:table-cell>
          <table:table-cell table:style-name="warn" office:value-type="string">
            <text:p>🎯 NOW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Marth Fen sweep</text:p>
          </table:table-cell>
          <table:table-cell office:value-type="string">
            <text:p>Blackfens / Rhest area</text:p>
          </table:table-cell>
          <table:table-cell office:value-type="string">
            <text:p>Razorfiend nest active; Saarvith consolidates</text:p>
          </table:table-cell>
          <table:table-cell office:value-type="string">
            <text:p>⏳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Vanguard raids continue</text:p>
          </table:table-cell>
          <table:table-cell office:value-type="string">
            <text:p>Raid minori Channath settentrionale</text:p>
          </table:table-cell>
          <table:table-cell office:value-type="string">
            <text:p>Distaccamenti locali</text:p>
          </table:table-cell>
          <table:table-cell office:value-type="string">
            <text:p>⏳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Elsir Crossroads</text:p>
          </table:table-cell>
          <table:table-cell office:value-type="string">
            <text:p>Channath Crocevia</text:p>
          </table:table-cell>
          <table:table-cell office:value-type="string">
            <text:p>Horde si riunisce</text:p>
          </table:table-cell>
          <table:table-cell office:value-type="string">
            <text:p>⏳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Last supply consolidation</text:p>
          </table:table-cell>
          <table:table-cell office:value-type="string">
            <text:p>Witchcross fall</text:p>
          </table:table-cell>
          <table:table-cell office:value-type="string">
            <text:p>Druidi caduti; bosco bruciato — resistenza +1 gg</text:p>
          </table:table-cell>
          <table:table-cell office:value-type="string">
            <text:p>⏳</text:p>
          </table:table-cell>
        </table:table-row>
        <table:table-row>
          <table:table-cell office:value-type="string">
            <text:p>35-37</text:p>
          </table:table-cell>
          <table:table-cell office:value-type="string">
            <text:p>SOSTA SONJAK</text:p>
          </table:table-cell>
          <table:table-cell office:value-type="string">
            <text:p>Rovine Witchcross</text:p>
          </table:table-cell>
          <table:table-cell office:value-type="string">
            <text:p>Esperimenti aberranti + attesa convogli rifornimento</text:p>
          </table:table-cell>
          <table:table-cell table:style-name="cond" office:value-type="string">
            <text:p>⏳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Advance scouts at Brindol</text:p>
          </table:table-cell>
          <table:table-cell office:value-type="string">
            <text:p>Scout drow a Rethmar</text:p>
          </table:table-cell>
          <table:table-cell office:value-type="string">
            <text:p>Fase 0 — Notte dei Drow inizia</text:p>
          </table:table-cell>
          <table:table-cell office:value-type="string">
            <text:p>⏳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Horde arrives Brindol &amp; encamps</text:p>
          </table:table-cell>
          <table:table-cell office:value-type="string">
            <text:p>Horde arriva Rethmar &amp; encamps</text:p>
          </table:table-cell>
          <table:table-cell office:value-type="string">
            <text:p>RETHMAR ASSAULT FASE 1</text:p>
          </table:table-cell>
          <table:table-cell table:style-name="warn" office:value-type="string">
            <text:p>⏳</text:p>
          </table:table-cell>
        </table:table-row>
        <table:table-row>
          <table:table-cell/>
        </table:table-row>
        <table:table-row>
          <table:table-cell table:style-name="head" office:value-type="string">
            <text:p>ATTRITION LEDGER</text:p>
          </table:table-cell>
          <table:table-cell/>
          <table:table-cell/>
          <table:table-cell/>
          <table:table-cell/>
        </table:table-row>
        <table:table-row>
          <table:table-cell table:style-name="bold" office:value-type="string">
            <text:p>Day</text:p>
          </table:table-cell>
          <table:table-cell table:style-name="bold" office:value-type="string">
            <text:p>Evento</text:p>
          </table:table-cell>
          <table:table-cell table:style-name="bold" office:value-type="string">
            <text:p>Perdite</text:p>
          </table:table-cell>
          <table:table-cell table:style-name="bold" office:value-type="string">
            <text:p>Acquisti</text:p>
          </table:table-cell>
          <table:table-cell table:style-name="bold" office:value-type="string">
            <text:p>Orda residua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Partenza</text:p>
          </table:table-cell>
          <table:table-cell office:value-type="float" office:value="0.0">
            <text:p>0</text:p>
          </table:table-cell>
          <table:table-cell office:value-type="string">
            <text:p>—</text:p>
          </table:table-cell>
          <table:table-cell office:value-type="float" office:value="9940.0">
            <text:p>9.94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Vraath Keep (scaramuccia)</text:p>
          </table:table-cell>
          <table:table-cell office:value-type="float" office:value="-40.0">
            <text:p>-40</text:p>
          </table:table-cell>
          <table:table-cell office:value-type="string">
            <text:p>+20 gnoll</text:p>
          </table:table-cell>
          <table:table-cell office:value-type="float" office:value="9920.0">
            <text:p>9.920</text:p>
          </table:table-cell>
        </table:table-row>
        <table:table-row>
          <table:table-cell office:value-type="string">
            <text:p>8-9</text:p>
          </table:table-cell>
          <table:table-cell office:value-type="string">
            <text:p>Skull Gorge crossing</text:p>
          </table:table-cell>
          <table:table-cell office:value-type="float" office:value="-30.0">
            <text:p>-30</text:p>
          </table:table-cell>
          <table:table-cell office:value-type="string">
            <text:p>—</text:p>
          </table:table-cell>
          <table:table-cell office:value-type="float" office:value="9890.0">
            <text:p>9.890</text:p>
          </table:table-cell>
        </table:table-row>
        <table:table-row>
          <table:table-cell office:value-type="string">
            <text:p>12-13</text:p>
          </table:table-cell>
          <table:table-cell office:value-type="string">
            <text:p>Drellin's Ferry</text:p>
          </table:table-cell>
          <table:table-cell office:value-type="float" office:value="-150.0">
            <text:p>-150</text:p>
          </table:table-cell>
          <table:table-cell office:value-type="string">
            <text:p>+60 orchi</text:p>
          </table:table-cell>
          <table:table-cell office:value-type="float" office:value="9800.0">
            <text:p>9.800</text:p>
          </table:table-cell>
        </table:table-row>
        <table:table-row>
          <table:table-cell office:value-type="string">
            <text:p>15-17</text:p>
          </table:table-cell>
          <table:table-cell office:value-type="string">
            <text:p>Marcia + partigiani</text:p>
          </table:table-cell>
          <table:table-cell office:value-type="float" office:value="-80.0">
            <text:p>-80</text:p>
          </table:table-cell>
          <table:table-cell office:value-type="string">
            <text:p>—</text:p>
          </table:table-cell>
          <table:table-cell office:value-type="float" office:value="9720.0">
            <text:p>9.72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rrelton + Hammerfist (-900 vanguard)</text:p>
          </table:table-cell>
          <table:table-cell office:value-type="float" office:value="-1150.0">
            <text:p>-1.150</text:p>
          </table:table-cell>
          <table:table-cell office:value-type="float" office:value="40.0">
            <text:p>+40</text:p>
          </table:table-cell>
          <table:table-cell office:value-type="float" office:value="8610.0">
            <text:p>8.610</text:p>
          </table:table-cell>
        </table:table-row>
        <table:table-row>
          <table:table-cell office:value-type="string">
            <text:p>20-24</text:p>
          </table:table-cell>
          <table:table-cell office:value-type="string">
            <text:p>Post-Hammerfist, morale −2</text:p>
          </table:table-cell>
          <table:table-cell office:value-type="float" office:value="-120.0">
            <text:p>-120</text:p>
          </table:table-cell>
          <table:table-cell office:value-type="string">
            <text:p>—</text:p>
          </table:table-cell>
          <table:table-cell office:value-type="float" office:value="8490.0">
            <text:p>8.490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Blackfens (Razorfiend fuoco amico)</text:p>
          </table:table-cell>
          <table:table-cell office:value-type="float" office:value="-60.0">
            <text:p>-60</text:p>
          </table:table-cell>
          <table:table-cell office:value-type="string">
            <text:p>—</text:p>
          </table:table-cell>
          <table:table-cell office:value-type="float" office:value="8430.0">
            <text:p>8.430</text:p>
          </table:table-cell>
        </table:table-row>
        <table:table-row>
          <table:table-cell office:value-type="string">
            <text:p>27-32</text:p>
          </table:table-cell>
          <table:table-cell office:value-type="string">
            <text:p>Marcia centrale</text:p>
          </table:table-cell>
          <table:table-cell office:value-type="float" office:value="-130.0">
            <text:p>-130</text:p>
          </table:table-cell>
          <table:table-cell office:value-type="string">
            <text:p>+200 Teschio Nero</text:p>
          </table:table-cell>
          <table:table-cell office:value-type="float" office:value="8500.0">
            <text:p>8.500</text:p>
          </table:table-cell>
        </table:table-row>
        <table:table-row>
          <table:table-cell office:value-type="string">
            <text:p>33-35</text:p>
          </table:table-cell>
          <table:table-cell office:value-type="string">
            <text:p>Crocevia + Witchcross (druidi)</text:p>
          </table:table-cell>
          <table:table-cell office:value-type="float" office:value="-110.0">
            <text:p>-110</text:p>
          </table:table-cell>
          <table:table-cell office:value-type="string">
            <text:p>—</text:p>
          </table:table-cell>
          <table:table-cell office:value-type="float" office:value="8390.0">
            <text:p>8.390</text:p>
          </table:table-cell>
        </table:table-row>
        <table:table-row>
          <table:table-cell office:value-type="string">
            <text:p>35-37</text:p>
          </table:table-cell>
          <table:table-cell office:value-type="string">
            <text:p>SOSTA SONJAK</text:p>
          </table:table-cell>
          <table:table-cell office:value-type="float" office:value="-20.0">
            <text:p>-20</text:p>
          </table:table-cell>
          <table:table-cell office:value-type="string">
            <text:p>+83 aberrazioni</text:p>
          </table:table-cell>
          <table:table-cell table:style-name="cond" office:value-type="float" office:value="8453.0">
            <text:p>8.453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Scouts avanzati</text:p>
          </table:table-cell>
          <table:table-cell office:value-type="float" office:value="-30.0">
            <text:p>-30</text:p>
          </table:table-cell>
          <table:table-cell office:value-type="string">
            <text:p>—</text:p>
          </table:table-cell>
          <table:table-cell office:value-type="float" office:value="8423.0">
            <text:p>8.423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ARRIVO RETHMAR</text:p>
          </table:table-cell>
          <table:table-cell office:value-type="float" office:value="-30.0">
            <text:p>-30</text:p>
          </table:table-cell>
          <table:table-cell office:value-type="string">
            <text:p>+Additivi cond.</text:p>
          </table:table-cell>
          <table:table-cell table:style-name="warn" office:value-type="string">
            <text:p>~8.390</text:p>
          </table:table-cell>
        </table:table-row>
      </table:table>
      <table:table table:name="Difensori Rethmar" table:style-name="ta1">
        <table:table-row>
          <table:table-cell table:style-name="head" office:value-type="string">
            <text:p>DIFENSORI RETHMAR — Tabelle PG-Dipendenti</text:p>
          </table:table-cell>
          <table:table-cell/>
          <table:table-cell/>
        </table:table-row>
        <table:table-row>
          <table:table-cell table:style-name="bold" office:value-type="string">
            <text:p>Contingente</text:p>
          </table:table-cell>
          <table:table-cell table:style-name="bold" office:value-type="string">
            <text:p>Numero</text:p>
          </table:table-cell>
          <table:table-cell table:style-name="bold" office:value-type="string">
            <text:p>Note</text:p>
          </table:table-cell>
        </table:table-row>
        <table:table-row>
          <table:table-cell table:style-name="sub" office:value-type="string">
            <text:p>GARANTITI (2.200)</text:p>
          </table:table-cell>
          <table:table-cell/>
          <table:table-cell/>
        </table:table-row>
        <table:table-row>
          <table:table-cell office:value-type="string">
            <text:p>Guarnigione Rethmar (Valerius + milizia urbana)</text:p>
          </table:table-cell>
          <table:table-cell office:value-type="float" office:value="1200.0">
            <text:p>1.200</text:p>
          </table:table-cell>
          <table:table-cell office:value-type="string">
            <text:p>Fighter 3 + milizia Warrior 1</text:p>
          </table:table-cell>
        </table:table-row>
        <table:table-row>
          <table:table-cell office:value-type="string">
            <text:p>Rifugiati armati (Vraath/Drellin/Terrelton ecc.)</text:p>
          </table:table-cell>
          <table:table-cell office:value-type="float" office:value="600.0">
            <text:p>600</text:p>
          </table:table-cell>
          <table:table-cell office:value-type="string">
            <text:p>già arrivati Day 19</text:p>
          </table:table-cell>
        </table:table-row>
        <table:table-row>
          <table:table-cell office:value-type="string">
            <text:p>Truppe Consiglio (se Thorik/Brenna hook OK)</text:p>
          </table:table-cell>
          <table:table-cell office:value-type="float" office:value="400.0">
            <text:p>400</text:p>
          </table:table-cell>
          <table:table-cell office:value-type="string">
            <text:p>condizionale ma probabile</text:p>
          </table:table-cell>
        </table:table-row>
        <table:table-row>
          <table:table-cell/>
        </table:table-row>
        <table:table-row>
          <table:table-cell table:style-name="sub" office:value-type="string">
            <text:p>CONDIZIONALI — max +2.500</text:p>
          </table:table-cell>
          <table:table-cell/>
          <table:table-cell/>
        </table:table-row>
        <table:table-row>
          <table:table-cell office:value-type="string">
            <text:p>Elfi Starsong Hill (Tiri Kitor)</text:p>
          </table:table-cell>
          <table:table-cell office:value-type="float" office:value="500.0">
            <text:p>+500</text:p>
          </table:table-cell>
          <table:table-cell office:value-type="string">
            <text:p>quest completata</text:p>
          </table:table-cell>
        </table:table-row>
        <table:table-row>
          <table:table-cell office:value-type="string">
            <text:p>Nani di Dauth (Tordek vince torneo)</text:p>
          </table:table-cell>
          <table:table-cell office:value-type="float" office:value="400.0">
            <text:p>+400</text:p>
          </table:table-cell>
          <table:table-cell office:value-type="string">
            <text:p>150 Lance + 250 rinforzi</text:p>
          </table:table-cell>
        </table:table-row>
        <table:table-row>
          <table:table-cell office:value-type="string">
            <text:p>Druidi Cerchio Sacro + Treant</text:p>
          </table:table-cell>
          <table:table-cell office:value-type="float" office:value="150.0">
            <text:p>+150</text:p>
          </table:table-cell>
          <table:table-cell office:value-type="string">
            <text:p>Hella ritual OK</text:p>
          </table:table-cell>
        </table:table-row>
        <table:table-row>
          <table:table-cell office:value-type="string">
            <text:p>Ghostlord alleato (branch raro)</text:p>
          </table:table-cell>
          <table:table-cell office:value-type="float" office:value="600.0">
            <text:p>+600</text:p>
          </table:table-cell>
          <table:table-cell office:value-type="string">
            <text:p>redenzione — non-morti buoni</text:p>
          </table:table-cell>
        </table:table-row>
        <table:table-row>
          <table:table-cell office:value-type="string">
            <text:p>Mercenari Salvatore (rischio)</text:p>
          </table:table-cell>
          <table:table-cell office:value-type="string">
            <text:p>±300</text:p>
          </table:table-cell>
          <table:table-cell office:value-type="string">
            <text:p>tradimento se non smascherato</text:p>
          </table:table-cell>
        </table:table-row>
        <table:table-row>
          <table:table-cell office:value-type="string">
            <text:p>Hammerfist 150 Lance</text:p>
          </table:table-cell>
          <table:table-cell office:value-type="float" office:value="150.0">
            <text:p>+150</text:p>
          </table:table-cell>
          <table:table-cell office:value-type="string">
            <text:p>Thorik diplomacy/torneo</text:p>
          </table:table-cell>
        </table:table-row>
        <table:table-row>
          <table:table-cell/>
        </table:table-row>
        <table:table-row>
          <table:table-cell table:style-name="sub" office:value-type="string">
            <text:p>SCENARI TOTALI DIFENSORI</text:p>
          </table:table-cell>
          <table:table-cell/>
          <table:table-cell/>
        </table:table-row>
        <table:table-row>
          <table:table-cell office:value-type="string">
            <text:p>Peggior caso (0 alleanze)</text:p>
          </table:table-cell>
          <table:table-cell office:value-type="float" office:value="2200.0">
            <text:p>2.200</text:p>
          </table:table-cell>
          <table:table-cell office:value-type="string">
            <text:p>solo garantiti</text:p>
          </table:table-cell>
        </table:table-row>
        <table:table-row>
          <table:table-cell office:value-type="string">
            <text:p>Caso medio (3 alleanze)</text:p>
          </table:table-cell>
          <table:table-cell office:value-type="float" office:value="3100.0">
            <text:p>3.100</text:p>
          </table:table-cell>
          <table:table-cell/>
        </table:table-row>
        <table:table-row>
          <table:table-cell office:value-type="string">
            <text:p>Miglior caso (tutte le alleanze)</text:p>
          </table:table-cell>
          <table:table-cell office:value-type="float" office:value="4450.0">
            <text:p>4.450</text:p>
          </table:table-cell>
          <table:table-cell/>
        </table:table-row>
        <table:table-row>
          <table:table-cell office:value-type="string">
            <text:p>Leggendario (Ghostlord redento)</text:p>
          </table:table-cell>
          <table:table-cell office:value-type="float" office:value="4700.0">
            <text:p>4.700</text:p>
          </table:table-cell>
          <table:table-cell office:value-type="string">
            <text:p>massimo teorico</text:p>
          </table:table-cell>
        </table:table-row>
      </table:table>
      <table:table table:name="Scenari Finali" table:style-name="ta1">
        <table:table-row>
          <table:table-cell table:style-name="head" office:value-type="string">
            <text:p>SCENARI FINALI — Rapporto di Forze a Rethmar (Day 42)</text:p>
          </table:table-cell>
          <table:table-cell/>
          <table:table-cell/>
          <table:table-cell/>
          <table:table-cell/>
        </table:table-row>
        <table:table-row>
          <table:table-cell table:style-name="bold" office:value-type="string">
            <text:p>Scenario</text:p>
          </table:table-cell>
          <table:table-cell table:style-name="bold" office:value-type="string">
            <text:p>Orda Day 42</text:p>
          </table:table-cell>
          <table:table-cell table:style-name="bold" office:value-type="string">
            <text:p>Difensori</text:p>
          </table:table-cell>
          <table:table-cell table:style-name="bold" office:value-type="string">
            <text:p>Rapporto</text:p>
          </table:table-cell>
          <table:table-cell table:style-name="bold" office:value-type="string">
            <text:p>Esito probabile</text:p>
          </table:table-cell>
        </table:table-row>
        <table:table-row>
          <table:table-cell office:value-type="string">
            <text:p>Worst (Ghostlord ostile, Xal'thor allea, 0 quest)</text:p>
          </table:table-cell>
          <table:table-cell office:value-type="string">
            <text:p>~12.700</text:p>
          </table:table-cell>
          <table:table-cell office:value-type="float" office:value="2200.0">
            <text:p>2.200</text:p>
          </table:table-cell>
          <table:table-cell office:value-type="string">
            <text:p>5.8:1</text:p>
          </table:table-cell>
          <table:table-cell table:style-name="warn" office:value-type="string">
            <text:p>Rethmar CADE</text:p>
          </table:table-cell>
        </table:table-row>
        <table:table-row>
          <table:table-cell office:value-type="string">
            <text:p>Baseline (Ghostlord morto/neutrale, 0 quest PG)</text:p>
          </table:table-cell>
          <table:table-cell office:value-type="string">
            <text:p>~9.400</text:p>
          </table:table-cell>
          <table:table-cell office:value-type="float" office:value="2200.0">
            <text:p>2.200</text:p>
          </table:table-cell>
          <table:table-cell office:value-type="string">
            <text:p>4.3:1</text:p>
          </table:table-cell>
          <table:table-cell table:style-name="warn" office:value-type="string">
            <text:p>Sconfitta quasi certa</text:p>
          </table:table-cell>
        </table:table-row>
        <table:table-row>
          <table:table-cell office:value-type="string">
            <text:p>Baseline + Sonjak sabotata (−83 aberrazioni)</text:p>
          </table:table-cell>
          <table:table-cell office:value-type="string">
            <text:p>~9.300</text:p>
          </table:table-cell>
          <table:table-cell office:value-type="float" office:value="2200.0">
            <text:p>2.200</text:p>
          </table:table-cell>
          <table:table-cell office:value-type="string">
            <text:p>4.2:1</text:p>
          </table:table-cell>
          <table:table-cell office:value-type="string">
            <text:p>Sconfitta quasi certa</text:p>
          </table:table-cell>
        </table:table-row>
        <table:table-row>
          <table:table-cell office:value-type="string">
            <text:p>Medio (2-3 quest + sabotaggi parziali PG)</text:p>
          </table:table-cell>
          <table:table-cell office:value-type="string">
            <text:p>~8.000</text:p>
          </table:table-cell>
          <table:table-cell office:value-type="float" office:value="3100.0">
            <text:p>3.100</text:p>
          </table:table-cell>
          <table:table-cell office:value-type="string">
            <text:p>2.6:1</text:p>
          </table:table-cell>
          <table:table-cell office:value-type="string">
            <text:p>Difficile ma vincibile con PG eroici</text:p>
          </table:table-cell>
        </table:table-row>
        <table:table-row>
          <table:table-cell office:value-type="string">
            <text:p>Ottimale (tutte quest + Rhest + Tower)</text:p>
          </table:table-cell>
          <table:table-cell office:value-type="string">
            <text:p>~6.800</text:p>
          </table:table-cell>
          <table:table-cell office:value-type="float" office:value="4100.0">
            <text:p>4.100</text:p>
          </table:table-cell>
          <table:table-cell office:value-type="string">
            <text:p>1.66:1</text:p>
          </table:table-cell>
          <table:table-cell table:style-name="ok" office:value-type="string">
            <text:p>Vittoria con perdite</text:p>
          </table:table-cell>
        </table:table-row>
        <table:table-row>
          <table:table-cell office:value-type="string">
            <text:p>Leggendario (ottimale + Ghostlord redento + Col. stop)</text:p>
          </table:table-cell>
          <table:table-cell office:value-type="string">
            <text:p>~6.400</text:p>
          </table:table-cell>
          <table:table-cell office:value-type="float" office:value="4700.0">
            <text:p>4.700</text:p>
          </table:table-cell>
          <table:table-cell office:value-type="string">
            <text:p>1.36:1</text:p>
          </table:table-cell>
          <table:table-cell table:style-name="ok" office:value-type="string">
            <text:p>Vittoria decisiva</text:p>
          </table:table-cell>
        </table:table-row>
        <table:table-row>
          <table:table-cell/>
        </table:table-row>
        <table:table-row>
          <table:table-cell table:style-name="head" office:value-type="string">
            <text:p>NOTA CHIAVE — SENZA PG, RETHMAR CADE</text:p>
          </table:table-cell>
          <table:table-cell/>
          <table:table-cell/>
          <table:table-cell/>
          <table:table-cell/>
        </table:table-row>
        <table:table-row>
          <table:table-cell table:style-name="warn" office:value-type="string">
            <text:p>Baseline narrativo: Hammerfist = 900/300 = 3:1, vinta con sacrifici (210 nani su 300). Rethmar senza PG = 4.3:1 → SCONFITTA. Con sforzo medio PG = 2.6:1 → POSSIBILE. Con PG eccellenti = 1.66:1 → VITTORIA.</text:p>
          </table:table-cell>
          <table:table-cell/>
          <table:table-cell/>
          <table:table-cell/>
          <table:table-cell/>
        </table:table-row>
      </table:table>
      <table:table table:name="Dual Clock Model" table:style-name="ta1">
        <table:table-row>
          <table:table-cell table:style-name="head" office:value-type="string">
            <text:p>DUAL-CLOCK MODEL (canon 2026-05-05 v2.1)</text:p>
          </table:table-cell>
          <table:table-cell/>
          <table:table-cell/>
        </table:table-row>
        <table:table-row>
          <table:table-cell table:style-name="bold" office:value-type="string">
            <text:p>Clock</text:p>
          </table:table-cell>
          <table:table-cell table:style-name="bold" office:value-type="string">
            <text:p>Descrizione</text:p>
          </table:table-cell>
          <table:table-cell table:style-name="bold" office:value-type="string">
            <text:p>Stato attuale</text:p>
          </table:table-cell>
        </table:table-row>
        <table:table-row>
          <table:table-cell office:value-type="string">
            <text:p>MARCH CLOCK</text:p>
          </table:table-cell>
          <table:table-cell office:value-type="string">
            <text:p>Posizione fisica orda. Day 1 → Day 42. Deterministico.</text:p>
          </table:table-cell>
          <table:table-cell office:value-type="string">
            <text:p>Day 19 — Skull Gorge / SYNC POINT Hammerfist</text:p>
          </table:table-cell>
        </table:table-row>
        <table:table-row>
          <table:table-cell office:value-type="string">
            <text:p>RITUAL CLOCK</text:p>
          </table:table-cell>
          <table:table-cell office:value-type="string">
            <text:p>Progressi rituali di Azarr Kul al Fane of Tiamat. NON avanza con i giorni di marcia.</text:p>
          </table:table-cell>
          <table:table-cell office:value-type="string">
            <text:p>9/18</text:p>
          </table:table-cell>
        </table:table-row>
        <table:table-row>
          <table:table-cell/>
        </table:table-row>
        <table:table-row>
          <table:table-cell table:style-name="sub" office:value-type="string">
            <text:p>MODIFICATORI MARCH CLOCK (PG actions)</text:p>
          </table:table-cell>
          <table:table-cell/>
          <table:table-cell/>
        </table:table-row>
        <table:table-row>
          <table:table-cell table:style-name="bold" office:value-type="string">
            <text:p>Azione</text:p>
          </table:table-cell>
          <table:table-cell table:style-name="bold" office:value-type="string">
            <text:p>Modifica giorni</text:p>
          </table:table-cell>
          <table:table-cell table:style-name="bold" office:value-type="string">
            <text:p>Stato</text:p>
          </table:table-cell>
        </table:table-row>
        <table:table-row>
          <table:table-cell office:value-type="string">
            <text:p>Skull Gorge bridge distrutto</text:p>
          </table:table-cell>
          <table:table-cell office:value-type="string">
            <text:p>+3 gg</text:p>
          </table:table-cell>
          <table:table-cell office:value-type="string">
            <text:p>❌ Già attraversato intatto — impossibile ora</text:p>
          </table:table-cell>
        </table:table-row>
        <table:table-row>
          <table:table-cell office:value-type="string">
            <text:p>Centauri/Loxo rivolta (PG catalizzano)</text:p>
          </table:table-cell>
          <table:table-cell office:value-type="string">
            <text:p>+1 gg ciascuna</text:p>
          </table:table-cell>
          <table:table-cell office:value-type="string">
            <text:p>❓ Window Day 20-35</text:p>
          </table:table-cell>
        </table:table-row>
        <table:table-row>
          <table:table-cell office:value-type="string">
            <text:p>Sabotaggio rifornimenti orda</text:p>
          </table:table-cell>
          <table:table-cell office:value-type="string">
            <text:p>+1-2 gg</text:p>
          </table:table-cell>
          <table:table-cell office:value-type="string">
            <text:p>❓ Window Day 20-35</text:p>
          </table:table-cell>
        </table:table-row>
        <table:table-row>
          <table:table-cell office:value-type="string">
            <text:p>Nessuna interferenza PG</text:p>
          </table:table-cell>
          <table:table-cell office:value-type="string">
            <text:p>0</text:p>
          </table:table-cell>
          <table:table-cell office:value-type="string">
            <text:p>Day 42 confermato</text:p>
          </table:table-cell>
        </table:table-row>
        <table:table-row>
          <table:table-cell office:value-type="string">
            <text:p>Max interferenza PG</text:p>
          </table:table-cell>
          <table:table-cell office:value-type="string">
            <text:p>+5-7 gg</text:p>
          </table:table-cell>
          <table:table-cell office:value-type="string">
            <text:p>Day 47-49 worst case per orda</text:p>
          </table:table-cell>
        </table:table-row>
      </table:table>
      <table:table table:name="Aberrazioni Sonjak" table:style-name="ta1">
        <table:table-row>
          <table:table-cell table:style-name="head" office:value-type="string">
            <text:p>ESPERIMENTI ABERRANTI — Matrona Sonjak (Day 35-37)</text:p>
          </table:table-cell>
          <table:table-cell/>
          <table:table-cell/>
          <table:table-cell/>
        </table:table-row>
        <table:table-row>
          <table:table-cell table:style-name="bold" office:value-type="string">
            <text:p>Unità</text:p>
          </table:table-cell>
          <table:table-cell table:style-name="bold" office:value-type="string">
            <text:p>GS</text:p>
          </table:table-cell>
          <table:table-cell table:style-name="bold" office:value-type="string">
            <text:p>Numero</text:p>
          </table:table-cell>
          <table:table-cell table:style-name="bold" office:value-type="string">
            <text:p>Descrizione</text:p>
          </table:table-cell>
        </table:table-row>
        <table:table-row>
          <table:table-cell office:value-type="string">
            <text:p>Sporeborn (Drow ibridati spore fungine Underdark)</text:p>
          </table:table-cell>
          <table:table-cell office:value-type="string">
            <text:p>6</text:p>
          </table:table-cell>
          <table:table-cell office:value-type="float" office:value="30.0">
            <text:p>30</text:p>
          </table:table-cell>
          <table:table-cell office:value-type="string">
            <text:p>Str +4 vs base Drow; immunità al dolore; berserker mode attivo 1d6 round dopo primo colpo subito; rischio fuoco amico 1/10 round in berserk</text:p>
          </table:table-cell>
        </table:table-row>
        <table:table-row>
          <table:table-cell office:value-type="string">
            <text:p>Servitori della Spora (umanoidi catturati infetti)</text:p>
          </table:table-cell>
          <table:table-cell office:value-type="string">
            <text:p>3</text:p>
          </table:table-cell>
          <table:table-cell office:value-type="float" office:value="45.0">
            <text:p>45</text:p>
          </table:table-cell>
          <table:table-cell office:value-type="string">
            <text:p>Druidi e civili Witchcross trasformati; carica suicida (muoiono uccidendo); veleno da contatto CD 16 Fort; mindless — unità monouso</text:p>
          </table:table-cell>
        </table:table-row>
        <table:table-row>
          <table:table-cell office:value-type="string">
            <text:p>Guardiani Neri (innesti aberranti élite Sonjak)</text:p>
          </table:table-cell>
          <table:table-cell office:value-type="string">
            <text:p>9</text:p>
          </table:table-cell>
          <table:table-cell office:value-type="float" office:value="8.0">
            <text:p>8</text:p>
          </table:table-cell>
          <table:table-cell office:value-type="string">
            <text:p>Innesti: occhio-beholder (Antimagic Ray 3/gg) + tentacolo illithid (Mind Blast 1/gg, CD 18). Lenti (Velocità 6) ma devastanti</text:p>
          </table:table-cell>
        </table:table-row>
        <table:table-row>
          <table:table-cell office:value-type="string">
            <text:p>TOTALE ABERRAZIONI</text:p>
          </table:table-cell>
          <table:table-cell/>
          <table:table-cell office:value-type="float" office:value="83.0">
            <text:p>83</text:p>
          </table:table-cell>
          <table:table-cell/>
        </table:table-row>
        <table:table-row>
          <table:table-cell/>
        </table:table-row>
        <table:table-row>
          <table:table-cell table:style-name="head" office:value-type="string">
            <text:p>TRIGGER DM</text:p>
          </table:table-cell>
          <table:table-cell/>
          <table:table-cell/>
          <table:table-cell/>
        </table:table-row>
        <table:table-row>
          <table:table-cell table:style-name="bold" office:value-type="string">
            <text:p>Condizione</text:p>
          </table:table-cell>
          <table:table-cell table:style-name="bold" office:value-type="string">
            <text:p>Effetto</text:p>
          </table:table-cell>
          <table:table-cell/>
          <table:table-cell/>
        </table:table-row>
        <table:table-row>
          <table:table-cell office:value-type="string">
            <text:p>PG sabotano Campi Drow (P3 missione)</text:p>
          </table:table-cell>
          <table:table-cell office:value-type="string">
            <text:p>−45 Servitori, −30 Sporeborn distrutti (lab bruciato). Solo 8 Guardiani Neri sopravvivono.</text:p>
          </table:table-cell>
          <table:table-cell/>
          <table:table-cell/>
        </table:table-row>
        <table:table-row>
          <table:table-cell office:value-type="string">
            <text:p>PG non sabotano i campi</text:p>
          </table:table-cell>
          <table:table-cell office:value-type="string">
            <text:p>Tutti 83 aberrazioni disponibili a Rethmar. Fase 0 (Notte dei Drow) usa 20 Servitori + 10 Sporeborn come avanguardia suicida.</text:p>
          </table:table-cell>
          <table:table-cell/>
          <table:table-cell/>
        </table:table-row>
        <table:table-row>
          <table:table-cell office:value-type="string">
            <text:p>Hella completa il Rituale Sacro (bosco protetto)</text:p>
          </table:table-cell>
          <table:table-cell office:value-type="string">
            <text:p>Sonjak non cattura druidi — SOLO 45 Servitori civili (ridotto). 8 Guardiani Neri invariati.</text:p>
          </table:table-cell>
          <table:table-cell/>
          <table:table-cell/>
        </table:table-row>
        <table:table-row>
          <table:table-cell/>
        </table:table-row>
        <table:table-row>
          <table:table-cell table:style-name="bold" office:value-type="string">
            <text:p>Note narrativa</text:p>
          </table:table-cell>
          <table:table-cell/>
          <table:table-cell/>
          <table:table-cell/>
        </table:table-row>
        <table:table-row>
          <table:table-cell office:value-type="string">
            <text:p>Sonjak ha sviluppato questo programma in 2 anni di esperimenti nell'Underdark. La sosta di Witchcross è la sua 'prova sul campo'. Se i PG incontrano i Servitori della Spora durante le fasi di esplorazione (Fase 0 o Fase 1), riconoscono tratti dei civili di Drellin's Ferry — potenziale momento emozionale R.A. Salvatore.</text:p>
          </table:table-cell>
          <table:table-cell/>
          <table:table-cell/>
          <table:table-cell/>
        </table:table-row>
      </table:table>
      <table:table table:name="Tracker Sessione" table:style-name="ta1">
        <table:table-row>
          <table:table-cell table:style-name="head" office:value-type="string">
            <text:p>TRACKER DINAMICO — Da aggiornare ogni sessione</text:p>
          </table:table-cell>
          <table:table-cell/>
          <table:table-cell/>
        </table:table-row>
        <table:table-row>
          <table:table-cell table:style-name="bold" office:value-type="string">
            <text:p>Campo</text:p>
          </table:table-cell>
          <table:table-cell table:style-name="bold" office:value-type="string">
            <text:p>Valore attuale</text:p>
          </table:table-cell>
          <table:table-cell table:style-name="bold" office:value-type="string">
            <text:p>Ultima modifica</text:p>
          </table:table-cell>
        </table:table-row>
        <table:table-row>
          <table:table-cell office:value-type="string">
            <text:p>March Clock (Day corrente)</text:p>
          </table:table-cell>
          <table:table-cell office:value-type="string">
            <text:p>19</text:p>
          </table:table-cell>
          <table:table-cell office:value-type="string">
            <text:p>SYNC POINT Hammerfist</text:p>
          </table:table-cell>
        </table:table-row>
        <table:table-row>
          <table:table-cell office:value-type="string">
            <text:p>Giorni rimasti a Rethmar</text:p>
          </table:table-cell>
          <table:table-cell office:value-type="string">
            <text:p>23</text:p>
          </table:table-cell>
          <table:table-cell office:value-type="string">
            <text:p>Day 42 target</text:p>
          </table:table-cell>
        </table:table-row>
        <table:table-row>
          <table:table-cell office:value-type="string">
            <text:p>Ritual Clock</text:p>
          </table:table-cell>
          <table:table-cell office:value-type="string">
            <text:p>9/18</text:p>
          </table:table-cell>
          <table:table-cell office:value-type="string">
            <text:p>—</text:p>
          </table:table-cell>
        </table:table-row>
        <table:table-row>
          <table:table-cell office:value-type="string">
            <text:p>Orda — main body attivo</text:p>
          </table:table-cell>
          <table:table-cell office:value-type="string">
            <text:p>~8.490</text:p>
          </table:table-cell>
          <table:table-cell office:value-type="string">
            <text:p>post-Day 19</text:p>
          </table:table-cell>
        </table:table-row>
        <table:table-row>
          <table:table-cell office:value-type="string">
            <text:p>Orda — con Sonjak aberrazioni (Day 37+)</text:p>
          </table:table-cell>
          <table:table-cell office:value-type="string">
            <text:p>+83 (⏳)</text:p>
          </table:table-cell>
          <table:table-cell office:value-type="string">
            <text:p>creati Day 35-37</text:p>
          </table:table-cell>
        </table:table-row>
        <table:table-row>
          <table:table-cell office:value-type="string">
            <text:p>Orda — baseline Rethmar</text:p>
          </table:table-cell>
          <table:table-cell office:value-type="string">
            <text:p>~8.390</text:p>
          </table:table-cell>
          <table:table-cell office:value-type="string">
            <text:p>target Day 42</text:p>
          </table:table-cell>
        </table:table-row>
        <table:table-row>
          <table:table-cell/>
        </table:table-row>
        <table:table-row>
          <table:table-cell table:style-name="sub" office:value-type="string">
            <text:p>AZIONI PG — CHECK</text:p>
          </table:table-cell>
          <table:table-cell/>
          <table:table-cell/>
        </table:table-row>
        <table:table-row>
          <table:table-cell office:value-type="string">
            <text:p>Skull Gorge bridge</text:p>
          </table:table-cell>
          <table:table-cell office:value-type="string">
            <text:p>❌ Già intatto — non modificabile</text:p>
          </table:table-cell>
          <table:table-cell/>
        </table:table-row>
        <table:table-row>
          <table:table-cell office:value-type="string">
            <text:p>Rivolta Centauri</text:p>
          </table:table-cell>
          <table:table-cell office:value-type="string">
            <text:p>❓ (Day 20-35)</text:p>
          </table:table-cell>
          <table:table-cell/>
        </table:table-row>
        <table:table-row>
          <table:table-cell office:value-type="string">
            <text:p>Rivolta Loxo</text:p>
          </table:table-cell>
          <table:table-cell office:value-type="string">
            <text:p>❓ (Day 20-35)</text:p>
          </table:table-cell>
          <table:table-cell/>
        </table:table-row>
        <table:table-row>
          <table:table-cell office:value-type="string">
            <text:p>Sabotaggio Campi Drow</text:p>
          </table:table-cell>
          <table:table-cell office:value-type="string">
            <text:p>❓ (Day 30-36) — −75 aberrazioni + −Fase 0</text:p>
          </table:table-cell>
          <table:table-cell/>
        </table:table-row>
        <table:table-row>
          <table:table-cell office:value-type="string">
            <text:p>Rhest (Saarvith + Regiarix)</text:p>
          </table:table-cell>
          <table:table-cell office:value-type="string">
            <text:p>❓ (Day 25-32) — −1 drago −200 unità</text:p>
          </table:table-cell>
          <table:table-cell/>
        </table:table-row>
        <table:table-row>
          <table:table-cell office:value-type="string">
            <text:p>Torre (Zalkatar + Ozyrrandion)</text:p>
          </table:table-cell>
          <table:table-cell office:value-type="string">
            <text:p>❓ (Day 28-35) — −1 drago −150 unità</text:p>
          </table:table-cell>
          <table:table-cell/>
        </table:table-row>
        <table:table-row>
          <table:table-cell office:value-type="string">
            <text:p>Ghostlord</text:p>
          </table:table-cell>
          <table:table-cell office:value-type="string">
            <text:p>❓ (Day 25-32) — 3 branch</text:p>
          </table:table-cell>
          <table:table-cell/>
        </table:table-row>
        <table:table-row>
          <table:table-cell/>
        </table:table-row>
        <table:table-row>
          <table:table-cell table:style-name="sub" office:value-type="string">
            <text:p>DIFENSORI — CHECK</text:p>
          </table:table-cell>
          <table:table-cell/>
          <table:table-cell/>
        </table:table-row>
        <table:table-row>
          <table:table-cell office:value-type="string">
            <text:p>Guarnigione garantita</text:p>
          </table:table-cell>
          <table:table-cell office:value-type="string">
            <text:p>2.200</text:p>
          </table:table-cell>
          <table:table-cell office:value-type="string">
            <text:p>fisso</text:p>
          </table:table-cell>
        </table:table-row>
        <table:table-row>
          <table:table-cell office:value-type="string">
            <text:p>Alleanze attivate</text:p>
          </table:table-cell>
          <table:table-cell office:value-type="string">
            <text:p>0/6</text:p>
          </table:table-cell>
          <table:table-cell office:value-type="string">
            <text:p>aggiornare</text:p>
          </table:table-cell>
        </table:table-row>
        <table:table-row>
          <table:table-cell office:value-type="string">
            <text:p>Tiri Kitor</text:p>
          </table:table-cell>
          <table:table-cell office:value-type="string">
            <text:p>0/500</text:p>
          </table:table-cell>
          <table:table-cell office:value-type="string">
            <text:p>❓ Starsong Hill</text:p>
          </table:table-cell>
        </table:table-row>
        <table:table-row>
          <table:table-cell office:value-type="string">
            <text:p>Nani Dauth</text:p>
          </table:table-cell>
          <table:table-cell office:value-type="string">
            <text:p>0/400</text:p>
          </table:table-cell>
          <table:table-cell office:value-type="string">
            <text:p>❓ Torneo</text:p>
          </table:table-cell>
        </table:table-row>
        <table:table-row>
          <table:table-cell office:value-type="string">
            <text:p>Druidi + Treant</text:p>
          </table:table-cell>
          <table:table-cell office:value-type="string">
            <text:p>0/150</text:p>
          </table:table-cell>
          <table:table-cell office:value-type="string">
            <text:p>❓ Hella ritual</text:p>
          </table:table-cell>
        </table:table-row>
        <table:table-row>
          <table:table-cell office:value-type="string">
            <text:p>Ghostlord (alleato)</text:p>
          </table:table-cell>
          <table:table-cell office:value-type="string">
            <text:p>0/600</text:p>
          </table:table-cell>
          <table:table-cell office:value-type="string">
            <text:p>❓ branch ra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Default" style:family="table-cell"/>
    <style:style style:name="bold" style:family="table-cell">
      <style:text-properties fo:font-weight="bold"/>
    </style:style>
    <style:style style:name="head" style:family="table-cell">
      <style:text-properties fo:font-weight="bold" fo:color="#FFFFFF"/>
      <style:table-cell-properties fo:background-color="#8B0000"/>
    </style:style>
    <style:style style:name="sub" style:family="table-cell">
      <style:text-properties fo:font-weight="bold"/>
      <style:table-cell-properties fo:background-color="#D4AA70"/>
    </style:style>
    <style:style style:name="ok" style:family="table-cell">
      <style:table-cell-properties fo:background-color="#C8E6C9"/>
    </style:style>
    <style:style style:name="warn" style:family="table-cell">
      <style:table-cell-properties fo:background-color="#FFCDD2"/>
    </style:style>
    <style:style style:name="cond" style:family="table-cell">
      <style:table-cell-properties fo:background-color="#FFF9C4"/>
    </style:style>
  </office:styles>
</office:document-styles>
</file>